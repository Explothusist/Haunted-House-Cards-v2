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1822A7D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39cm" svg:x="0cm" svg:y="0cm">
          <draw:image xlink:href="Pictures/10000001000009F600000CE41822A7D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13:12.122171300</meta:creation-date>
    <dc:date>2026-07-04T21:13:42.523886900</dc:date>
    <meta:editing-duration>PT30S</meta:editing-duration>
    <meta:editing-cycles>1</meta:editing-cycles>
    <meta:document-statistic meta:object-count="1"/>
    <meta:generator>LibreOffice/25.8.7.2$Windows_X86_64 LibreOffice_project/e9cfafff50477fae0fcf42925ebd2aec2bdc5df4</meta:generator>
  </office:meta>
</office:document-meta>
</file>