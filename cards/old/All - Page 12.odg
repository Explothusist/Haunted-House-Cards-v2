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C6FA4285.png" manifest:media-type="image/png"/>
  <manifest:file-entry manifest:full-path="Pictures/10000001000009F600000CE49A87B62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39cm" svg:x="0cm" svg:y="0cm">
          <draw:image xlink:href="Pictures/10000001000009F600000CE4C6FA428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9A87B6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8:44.669280000</meta:creation-date>
    <dc:date>2026-07-04T21:09:31.131148200</dc:date>
    <meta:editing-duration>PT46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