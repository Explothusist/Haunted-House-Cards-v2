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C5CC8F54.png" manifest:media-type="image/png"/>
  <manifest:file-entry manifest:full-path="Pictures/10000001000009F600000CE491C711E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C5CC8F54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91C711E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01:51.391024500</meta:creation-date>
    <dc:date>2026-07-04T21:02:37.024441700</dc:date>
    <meta:editing-duration>PT45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