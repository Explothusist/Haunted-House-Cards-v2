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F600000CE4E41583C5.png" manifest:media-type="image/png"/>
  <manifest:file-entry manifest:full-path="Pictures/10000001000009F600000CE4FC55739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1000009F600000CE4E41583C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cm" svg:height="27.939cm" svg:x="0cm" svg:y="0cm">
          <draw:image xlink:href="Pictures/10000001000009F600000CE4FC5573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7-04T21:06:47.003957600</meta:creation-date>
    <dc:date>2026-07-04T21:07:13.132391800</dc:date>
    <meta:editing-duration>PT26S</meta:editing-duration>
    <meta:editing-cycles>1</meta:editing-cycles>
    <meta:document-statistic meta:object-count="2"/>
    <meta:generator>LibreOffice/25.8.7.2$Windows_X86_64 LibreOffice_project/e9cfafff50477fae0fcf42925ebd2aec2bdc5df4</meta:generator>
  </office:meta>
</office:document-meta>
</file>