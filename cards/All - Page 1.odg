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299DDE79.png" manifest:media-type="image/png"/>
  <manifest:file-entry manifest:full-path="Pictures/10000001000009F600000CE4518E07A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299DDE7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518E07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0:56:27.299959900</meta:creation-date>
    <dc:date>2026-07-04T20:59:33.311229200</dc:date>
    <meta:editing-duration>PT3M6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