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4632F491.png" manifest:media-type="image/png"/>
  <manifest:file-entry manifest:full-path="Pictures/10000001000009F600000CE4B83BFD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B83BFD00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4632F4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10:27.637820400</meta:creation-date>
    <dc:date>2026-07-04T21:11:10.627764900</dc:date>
    <meta:editing-duration>PT43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