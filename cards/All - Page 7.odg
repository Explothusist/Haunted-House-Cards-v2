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0BB89E85.png" manifest:media-type="image/png"/>
  <manifest:file-entry manifest:full-path="Pictures/10000001000009F600000CE497A1C8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39cm" svg:x="0cm" svg:y="0cm">
          <draw:image xlink:href="Pictures/10000001000009F600000CE40BB89E8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97A1C82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5:45.684527700</meta:creation-date>
    <dc:date>2026-07-04T21:06:32.982175400</dc:date>
    <meta:editing-duration>PT47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