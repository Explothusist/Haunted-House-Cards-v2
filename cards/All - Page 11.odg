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1E274E14.png" manifest:media-type="image/png"/>
  <manifest:file-entry manifest:full-path="Pictures/10000001000009F600000CE4FC0B2B0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39cm" svg:x="0cm" svg:y="0cm">
          <draw:image xlink:href="Pictures/10000001000009F600000CE4FC0B2B0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1E274E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07:59.426326400</meta:creation-date>
    <dc:date>2026-07-04T21:08:42.743697300</dc:date>
    <meta:editing-duration>PT43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