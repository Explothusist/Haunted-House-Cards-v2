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BB4751E9.png" manifest:media-type="image/png"/>
  <manifest:file-entry manifest:full-path="Pictures/10000001000009F600000CE40868059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0868059A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BB4751E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9:33.338079000</meta:creation-date>
    <dc:date>2026-07-04T21:10:24.913440900</dc:date>
    <meta:editing-duration>PT51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