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89B40B2.png" manifest:media-type="image/png"/>
  <manifest:file-entry manifest:full-path="Pictures/10000001000009F600000CE42CA9201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cm">
          <draw:image xlink:href="Pictures/10000001000009F600000CE4289B40B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2CA9201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2:41.138115100</meta:creation-date>
    <dc:date>2026-07-04T21:03:24.500056900</dc:date>
    <meta:editing-duration>PT43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