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584D4546.png" manifest:media-type="image/png"/>
  <manifest:file-entry manifest:full-path="Pictures/10000001000009F600000CE4518E07A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584D454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cm">
          <draw:image xlink:href="Pictures/10000001000009F600000CE4518E07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0:17.922923600</meta:creation-date>
    <dc:date>2026-07-04T21:01:00.187975300</dc:date>
    <meta:editing-duration>PT42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